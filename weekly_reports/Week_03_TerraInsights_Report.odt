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P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P1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style:font-name="Times New Roman" fo:font-size="12pt" style:font-size-asian="12pt" style:font-size-complex="12pt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P19" style:parent-style-name="Normal" style:list-style-name="LFO1" style:family="paragraph"/>
    <style:style style:name="T2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P22" style:parent-style-name="Normal" style:list-style-name="LFO1" style:family="paragraph"/>
    <style:style style:name="T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list-style-name="LFO2" style:family="paragraph"/>
    <style:style style:name="T3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P39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4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" style:parent-style-name="Normal" style:list-style-name="LFO3" style:family="paragraph"/>
    <style:style style:name="T4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3" style:parent-style-name="DefaultParagraphFont" style:family="text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7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8" style:parent-style-name="Normal" style:list-style-name="LFO3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" style:parent-style-name="Normal" style:list-style-name="LFO4" style:family="paragraph"/>
    <style:style style:name="T5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P55" style:parent-style-name="Normal" style:list-style-name="LFO4" style:family="paragraph"/>
    <style:style style:name="T5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7" style:parent-style-name="DefaultParagraphFont" style:family="text">
      <style:text-properties style:font-name="Times New Roman" fo:font-size="12pt" style:font-size-asian="12pt" style:font-size-complex="12pt"/>
    </style:style>
    <style:style style:name="P58" style:parent-style-name="Normal" style:list-style-name="LFO4" style:family="paragraph"/>
    <style:style style:name="T5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0" style:parent-style-name="DefaultParagraphFont" style:family="text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2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3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4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<text:s/>TerraInsights: Sustainable Fertilizer Usage Optimizer for Higher Yield</text:span></text:p>
      <text:p text:style-name="Normal"><text:span text:style-name="T5">Group ID:</text:span><text:span text:style-name="T6"><text:s/></text:span><text:span text:style-name="T7">Group</text:span><text:span text:style-name="T8"><text:s/>- 14</text:span></text:p>
      <text:p text:style-name="P9">Branch &amp; Section:<text:s/>B.tech<text:s/>CSE-DS(IBM) AI&amp;DS-B</text:p>
      <text:p text:style-name="Normal"><text:span text:style-name="T10">Date:</text:span><text:span text:style-name="T11"><text:s/>26 Jan 2026 - 01 Feb 2026</text:span></text:p>
      <text:p text:style-name="P12">1.<text:s/>Executive Summary</text:p>
      <text:list text:style-name="LFO1" text:continue-numbering="true">
        <text:list-item>
          <text:p text:style-name="P13"><text:span text:style-name="T14">Current Sprint:</text:span><text:span text:style-name="T15"><text:s/>Sprint 2 of 6</text:span></text:p>
        </text:list-item>
        <text:list-item>
          <text:p text:style-name="P16"><text:span text:style-name="T17">Sprint Goal:</text:span><text:span text:style-name="T18"><text:s/>Understand the fertilizer dataset and prepare a reusable ML training workflow.</text:span></text:p>
        </text:list-item>
        <text:list-item>
          <text:p text:style-name="P19"><text:span text:style-name="T20">Status:</text:span><text:span text:style-name="T21"><text:s/>On Track (Green)</text:span></text:p>
        </text:list-item>
        <text:list-item>
          <text:p text:style-name="P22"><text:span text:style-name="T23">Detailed Progress:</text:span><text:span text:style-name="T24"><text:s/>This week the project concentrated on understand the fertilizer dataset and prepare a reusable ml training workflow. The team completed work around completed a component diagram for ml-backend-frontend interaction and a preprocessing workflow diagram showing how raw agricultural data is prepared before model training. In practical terms, the technical tasks covered TI-201 dataset audit, TI-202 feature classification, TI-203 preprocessing pipeline design., while testing status moved to 4 checks with a 100%<text:s/></text:span><text:span text:style-name="T25">pass rate. The main observation for the week was: Solved the issue of mixed categorical and numeric features by planning one-hot encoding plus scaling inside a single pipeline.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<text:s/>Completed a component diagram for ML-backend-frontend interaction and a preprocessing workflow diagram showing how raw agricultural data is prepared before model training.</text:span></text:p>
        </text:list-item>
        <text:list-item>
          <text:p text:style-name="P30"><text:span text:style-name="T31">Diagrams Revised:</text:span><text:span text:style-name="T32"><text:s/>Class diagram refined to include prediction history storage and model artifact usage.</text:span></text:p>
        </text:list-item>
        <text:list-item>
          <text:p text:style-name="P33"><text:span text:style-name="T34">Required Diagram Added:</text:span><text:span text:style-name="T35"><text:s/>Component Diagram - Explains how dataset processing, model training, backend serving, and frontend consumption connect as separate components.</text:span></text:p>
        </text:list-item>
        <text:list-item>
          <text:p text:style-name="P36"><text:span text:style-name="T37">OO Concept Applied:</text:span><text:span text:style-name="T38"><text:s/>Encapsulated preprocessing and model training inside a pipeline-oriented design to improve reuse.</text:span></text:p>
        </text:list-item>
      </text:list>
      <text:p text:style-name="P39">Required Diagram Image</text:p>
      <text:soft-page-break/>
      <text:p text:style-name="Normal"><draw:frame draw:style-name="a0" draw:name="Picture 1" text:anchor-type="as-char" svg:x="0in" svg:y="0in" svg:width="6.26806in" svg:height="4.04391in" style:rel-width="scale" style:rel-height="scale"><draw:image xlink:href="media/image1.png" xlink:type="simple" xlink:show="embed" xlink:actuate="onLoad"/><svg:title/><svg:desc/></draw:frame></text:p>
      <text:p text:style-name="P40">3. Technical<text:s/>Execution (DevOps &amp; Git)</text:p>
      <text:list text:style-name="LFO3" text:continue-numbering="true">
        <text:list-item>
          <text:p text:style-name="P41"><text:span text:style-name="T42">Jira Tasks Completed:</text:span><text:span text:style-name="T43"><text:s/>TI-201 dataset audit, TI-202 feature classification, TI-203 preprocessing pipeline design.</text:span></text:p>
        </text:list-item>
        <text:list-item>
          <text:p text:style-name="P44"><text:span text:style-name="T45">Git Activity:</text:span></text:p>
          <text:list text:continue-numbering="true">
            <text:list-item>
              <text:p text:style-name="P46">Active Branches: main</text:p>
            </text:list-item>
            <text:list-item>
              <text:p text:style-name="P47">Merged Pull Requests: N/A - local iterative development.</text:p>
            </text:list-item>
          </text:list>
        </text:list-item>
        <text:list-item>
          <text:p text:style-name="P48"><text:span text:style-name="T49">CI/CD Status:</text:span><text:span text:style-name="T50"><text:s/>Training script prepared and reviewed through manual execution planning; still no formal CI service configured.</text:span></text:p>
        </text:list-item>
      </text:list>
      <text:p text:style-name="P51">4. Testing Summary</text:p>
      <text:list text:style-name="LFO4" text:continue-numbering="true">
        <text:list-item>
          <text:p text:style-name="P52"><text:span text:style-name="T53">Total Unit Tests:</text:span><text:span text:style-name="T54"><text:s/>4</text:span></text:p>
        </text:list-item>
        <text:list-item>
          <text:p text:style-name="P55"><text:span text:style-name="T56">Pass Rate:</text:span><text:span text:style-name="T57"><text:s/>100%</text:span></text:p>
        </text:list-item>
        <text:list-item>
          <text:p text:style-name="P58"><text:span text:style-name="T59">Key Bug Identified:</text:span><text:span text:style-name="T60"><text:s/>Solved the issue of mixed categorical and numeric features by planning one-hot encoding plus scaling inside a single pipeline.</text:span></text:p>
        </text:list-item>
      </text:list>
      <text:p text:style-name="P61">5. Goals for Next Week</text:p>
      <text:list text:style-name="LFO5" text:continue-numbering="true">
        <text:list-item>
          <text:p text:style-name="P62">Implement the actual training script and persist the trained artifact.</text:p>
        </text:list-item>
        <text:list-item>
          <text:p text:style-name="P63">Prepare backend dependencies and database schema for prediction history.</text:p>
        </text:list-item>
      </text:list>
      <text:p text:style-name="P64"/>
      <text:p text:style-name="P65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4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Hiten Hemnani</dc:creator>
    <meta:creation-date>2026-04-09T15:38:00Z</meta:creation-date>
    <dc:date>2026-04-09T16:02:00Z</dc:date>
    <meta:template xlink:href="Normal" xlink:type="simple"/>
    <meta:editing-cycles>3</meta:editing-cycles>
    <meta:editing-duration>PT240S</meta:editing-duration>
    <meta:document-statistic meta:page-count="2" meta:paragraph-count="5" meta:word-count="378" meta:character-count="2532" meta:row-count="17" meta:non-whitespace-character-count="2159"/>
  </office:meta>
</office:document-meta>
</file>