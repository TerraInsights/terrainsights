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09 Mar 2026 - 15 Ma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5 of 6</text:span></text:p>
        </text:list-item>
        <text:list-item>
          <text:p text:style-name="P14"><text:span text:style-name="T15">Sprint Goal:</text:span><text:span text:style-name="T16"> Complete the content modules that support the recommendation experience beyond core prediction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Feature package diagram for Store, AgroGuide, and Govt Schemes pages.</text:span></text:p>
        </text:list-item>
        <text:list-item>
          <text:p text:style-name="P30"><text:span text:style-name="T31">Diagrams Revised:</text:span><text:span text:style-name="T32"> Navigation flow refined after adding educational and benefit-discovery modules to the main app menu.</text:span></text:p>
        </text:list-item>
        <text:list-item>
          <text:p text:style-name="P33"><text:span text:style-name="T34">OO Concept Applied:</text:span><text:span text:style-name="T35"> Used data-driven rendering by mapping arrays of products, guides, and scheme cards into reusable UI structures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501 store page prototype, TI-502 AgroGuide page filters, TI-503 government schemes page content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All major pages render locally; manual navigation walkthrough completed successfully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5</text:span></text:p>
        </text:list-item>
        <text:list-item>
          <text:p text:style-name="P51"><text:span text:style-name="T52">Pass Rate:</text:span><text:span text:style-name="T53"> 93%</text:span></text:p>
        </text:list-item>
        <text:list-item>
          <text:p text:style-name="P54"><text:span text:style-name="T55">Key Bug Identified:</text:span><text:span text:style-name="T56"> Fixed text encoding issues so currency and special UI labels display correctly inside the store and scheme content.</text:span></text:p>
        </text:list-item>
      </text:list>
      <text:p text:style-name="P57">5. Goals for Next Week</text:p>
      <text:list text:style-name="LFO5" text:continue-numbering="true">
        <text:list-item>
          <text:p text:style-name="P58">Refine responsive layout and visual hierarchy for all pages.</text:p>
        </text:list-item>
        <text:list-item>
          <text:p text:style-name="P59">Perform consolidated testing of ML prediction, history logging, and full UI flow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