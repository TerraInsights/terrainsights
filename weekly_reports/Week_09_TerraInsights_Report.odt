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paragraph-properties fo:text-align="center"/>
    </style:style>
    <style:style style:name="T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list-style-name="LFO3" style:family="paragraph"/>
    <style:style style:name="T43" style:parent-style-name="DefaultParagraphFont" style:family="text">
      <style:text-properties style:font-name="Times New Roman" fo:font-weight="bold" style:font-weight-asian="bold" style:font-weight-complex="bold"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Normal" style:list-style-name="LFO3" style:family="paragraph"/>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P47" style:parent-style-name="Normal" style:list-style-name="LFO3" style:family="paragraph">
      <style:text-properties style:font-name="Times New Roman" fo:font-size="12pt" style:font-size-asian="12pt" style:font-size-complex="12pt"/>
    </style:style>
    <style:style style:name="P48" style:parent-style-name="Normal" style:list-style-name="LFO3" style:family="paragraph">
      <style:text-properties style:font-name="Times New Roman" fo:font-size="12pt" style:font-size-asian="12pt" style:font-size-complex="12pt"/>
    </style:style>
    <style:style style:name="P49" style:parent-style-name="Normal" style:list-style-name="LFO3" style:family="paragraph"/>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P52" style:parent-style-name="Normal" style:family="paragraph">
      <style:text-properties style:font-name="Times New Roman" fo:font-weight="bold" style:font-weight-asian="bold" style:font-weight-complex="bold" fo:font-size="12pt" style:font-size-asian="12pt" style:font-size-complex="12pt"/>
    </style:style>
    <style:style style:name="P53" style:parent-style-name="Normal" style:list-style-name="LFO4" style:family="paragraph"/>
    <style:style style:name="T54" style:parent-style-name="DefaultParagraphFont" style:family="text">
      <style:text-properties style:font-name="Times New Roman" fo:font-weight="bold" style:font-weight-asian="bold" style:font-weight-complex="bold"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Normal" style:list-style-name="LFO4" style:family="paragraph"/>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Normal" style:list-style-name="LFO4" style:family="paragraph"/>
    <style:style style:name="T60" style:parent-style-name="DefaultParagraphFont" style:family="text">
      <style:text-properties style:font-name="Times New Roman" fo:font-weight="bold" style:font-weight-asian="bold" style:font-weight-complex="bold"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Normal" style:family="paragraph">
      <style:text-properties style:font-name="Times New Roman" fo:font-weight="bold" style:font-weight-asian="bold" style:font-weight-complex="bold" fo:font-size="12pt" style:font-size-asian="12pt" style:font-size-complex="12pt"/>
    </style:style>
    <style:style style:name="P63" style:parent-style-name="Normal" style:list-style-name="LFO5" style:family="paragraph">
      <style:text-properties style:font-name="Times New Roman" fo:font-size="12pt" style:font-size-asian="12pt" style:font-size-complex="12pt"/>
    </style:style>
    <style:style style:name="P64" style:parent-style-name="Normal" style:list-style-name="LFO5"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fo:language="en" fo:country="US"/>
    </style:style>
    <style:style style:name="P6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 14</text:span></text:p>
      <text:p text:style-name="P8">Branch &amp; Section:<text:s/>B.tech CSE-DS(IBM) AI&amp;DS-IBM</text:p>
      <text:p text:style-name="Normal"><text:span text:style-name="T9">Date:</text:span><text:span text:style-name="T10"><text:s/>09 Mar 2026 - 15 Mar 2026</text:span></text:p>
      <text:p text:style-name="P11">1.<text:s/>Executive Summary</text:p>
      <text:list text:style-name="LFO1" text:continue-numbering="true">
        <text:list-item>
          <text:p text:style-name="P12"><text:span text:style-name="T13">Current Sprint:</text:span><text:span text:style-name="T14"><text:s/>Sprint 5 of 6</text:span></text:p>
        </text:list-item>
        <text:list-item>
          <text:p text:style-name="P15"><text:span text:style-name="T16">Sprint Goal:</text:span><text:span text:style-name="T17"><text:s/>Complete the content modules that support the recommendation experience beyond core prediction.</text:span></text:p>
        </text:list-item>
        <text:list-item>
          <text:p text:style-name="P18"><text:span text:style-name="T19">Status:</text:span><text:span text:style-name="T20"><text:s/>On Track (Green)</text:span></text:p>
        </text:list-item>
        <text:list-item>
          <text:p text:style-name="P21"><text:span text:style-name="T22">Detailed Progress:</text:span><text:span text:style-name="T23"><text:s/>This week the project concentrated on complete the content modules that support the recommendation experience beyond core prediction. The team completed work around prepared the feature package diagram for store, agroguide, and govt schemes pages and described how these pages extend the core recommendation workflow. In practical terms, the technical tasks covered TI-501 store page prototype, TI-502 AgroGuide page filters, TI-503 government schemes page content., while testing status moved to 15 checks with</text:span><text:span text:style-name="T24"><text:s/>a 93% pass rate. The main observation for the week was: Fixed text encoding issues so currency and special UI labels display correctly inside the store and scheme content.</text:span></text:p>
        </text:list-item>
      </text:list>
      <text:p text:style-name="P25">2. UML &amp; OOAD Progress</text:p>
      <text:list text:style-name="LFO2" text:continue-numbering="true">
        <text:list-item>
          <text:p text:style-name="P26"><text:span text:style-name="T27">Diagrams Completed this week:</text:span><text:span text:style-name="T28"><text:s/>Prepared the feature package diagram for Store, AgroGuide, and Govt Schemes pages and described how these pages extend the core recommendation workflow.</text:span></text:p>
        </text:list-item>
        <text:list-item>
          <text:p text:style-name="P29"><text:span text:style-name="T30">Diagrams Revised:</text:span><text:span text:style-name="T31"><text:s/>Navigation flow refined after adding educational and benefit-discovery modules to the main app menu.</text:span></text:p>
        </text:list-item>
        <text:list-item>
          <text:p text:style-name="P32"><text:span text:style-name="T33">Required Diagram Added:</text:span><text:span text:style-name="T34"><text:s/>Feature Component Diagram - Highlights how supporting modules connect to the shared frontend shell without affecting backend prediction logic.</text:span></text:p>
        </text:list-item>
        <text:list-item>
          <text:p text:style-name="P35"><text:span text:style-name="T36">OO Concept Applied:</text:span><text:span text:style-name="T37"><text:s/>Used data-driven rendering by mapping arrays of products, guides, and scheme cards into reusable UI structures.</text:span></text:p>
        </text:list-item>
      </text:list>
      <text:p text:style-name="P38">Required Diagram Image</text:p>
      <text:soft-page-break/>
      <text:p text:style-name="Normal"><draw:frame draw:style-name="a0" draw:name="Picture 1" text:anchor-type="as-char" svg:x="0in" svg:y="0in" svg:width="6.26806in" svg:height="3.68334in" style:rel-width="scale" style:rel-height="scale"><draw:image xlink:href="media/image1.png" xlink:type="simple" xlink:show="embed" xlink:actuate="onLoad"/><svg:title/><svg:desc/></draw:frame></text:p>
      <text:p text:style-name="P39"><text:span text:style-name="T40">Final System Architecture Diagram</text:span></text:p>
      <text:p text:style-name="P41">3. Technical Execution (DevOps &amp; Git)</text:p>
      <text:list text:style-name="LFO3" text:continue-numbering="true">
        <text:list-item>
          <text:p text:style-name="P42"><text:span text:style-name="T43">Jira Tasks Completed:</text:span><text:span text:style-name="T44"><text:s/>TI-501 store page prototype, TI-502 AgroGuide page filters, TI-503 government schemes page content.</text:span></text:p>
        </text:list-item>
        <text:list-item>
          <text:p text:style-name="P45"><text:span text:style-name="T46">Git Activity:</text:span></text:p>
          <text:list text:continue-numbering="true">
            <text:list-item>
              <text:p text:style-name="P47">Active Branches: main</text:p>
            </text:list-item>
            <text:list-item>
              <text:p text:style-name="P48">Merged Pull Requests: N/A - local iterative development.</text:p>
            </text:list-item>
          </text:list>
        </text:list-item>
        <text:list-item>
          <text:p text:style-name="P49"><text:span text:style-name="T50">CI/CD Status:</text:span><text:span text:style-name="T51"><text:s/>All major pages render locally; manual navigation walkthrough completed successfully.</text:span></text:p>
        </text:list-item>
      </text:list>
      <text:p text:style-name="P52">4. Testing Summary</text:p>
      <text:list text:style-name="LFO4" text:continue-numbering="true">
        <text:list-item>
          <text:p text:style-name="P53"><text:span text:style-name="T54">Total Unit Tests:</text:span><text:span text:style-name="T55"><text:s/>15</text:span></text:p>
        </text:list-item>
        <text:list-item>
          <text:p text:style-name="P56"><text:span text:style-name="T57">Pass Rate:</text:span><text:span text:style-name="T58"><text:s/>93%</text:span></text:p>
        </text:list-item>
        <text:list-item>
          <text:p text:style-name="P59"><text:span text:style-name="T60">Key Bug Identified:</text:span><text:span text:style-name="T61"><text:s/>Fixed text encoding issues so currency and special UI labels display correctly inside the store and scheme content.</text:span></text:p>
        </text:list-item>
      </text:list>
      <text:p text:style-name="P62">5. Goals for Next Week</text:p>
      <text:list text:style-name="LFO5" text:continue-numbering="true">
        <text:list-item>
          <text:p text:style-name="P63">Refine responsive layout and visual hierarchy for all pages.</text:p>
        </text:list-item>
        <text:list-item>
          <text:p text:style-name="P64">Perform consolidated testing of ML prediction, history logging, and full UI flow.</text:p>
        </text:list-item>
      </text:list>
      <text:p text:style-name="P65"/>
      <text:p text:style-name="P66">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fo:language="en" fo:country="IN"/>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fo:language="en" fo:country="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8:00Z</dc:date>
    <meta:template xlink:href="Normal" xlink:type="simple"/>
    <meta:editing-cycles>4</meta:editing-cycles>
    <meta:editing-duration>PT540S</meta:editing-duration>
    <meta:document-statistic meta:page-count="2" meta:paragraph-count="5" meta:word-count="383" meta:character-count="2562" meta:row-count="18" meta:non-whitespace-character-count="2184"/>
  </office:meta>
</office:document-meta>
</file>