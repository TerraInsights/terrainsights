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23 Mar 2026 - 29 Ma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6 of 6</text:span></text:p>
        </text:list-item>
        <text:list-item>
          <text:p text:style-name="P14"><text:span text:style-name="T15">Sprint Goal:</text:span><text:span text:style-name="T16"> Carry out final validation, confirm prediction history logging, and strengthen project documentation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Final revision set for sequence, component, and deployment diagrams based on the implemented system.</text:span></text:p>
        </text:list-item>
        <text:list-item>
          <text:p text:style-name="P30"><text:span text:style-name="T31">Diagrams Revised:</text:span><text:span text:style-name="T32"> Prediction history flow updated after validating the stored fields and backend response lifecycle.</text:span></text:p>
        </text:list-item>
        <text:list-item>
          <text:p text:style-name="P33"><text:span text:style-name="T34">OO Concept Applied:</text:span><text:span text:style-name="T35"> Refined persistence design by keeping prediction history as a dedicated entity with a focused responsibility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601 end-to-end smoke testing, TI-602 history endpoint verification, TI-603 technical documentation updates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Manual build, API, and inference checks passing; deployment remains local but release-ready for demo use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8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Handled the model-not-loaded scenario gracefully so backend failures are surfaced clearly instead of silently breaking prediction requests.</text:span></text:p>
        </text:list-item>
      </text:list>
      <text:p text:style-name="P57">5. Goals for Next Week</text:p>
      <text:list text:style-name="LFO5" text:continue-numbering="true">
        <text:list-item>
          <text:p text:style-name="P58">Prepare final report package and demo talking points for submission.</text:p>
        </text:list-item>
        <text:list-item>
          <text:p text:style-name="P59">Do a last consistency pass on naming, folder structure, and weekly deliverable wording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