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09 Feb 2026 - 15 Feb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3 of 6</text:span></text:p>
        </text:list-item>
        <text:list-item>
          <text:p text:style-name="P14"><text:span text:style-name="T15">Sprint Goal:</text:span><text:span text:style-name="T16"> Develop the prediction API and integrate the trained model into backend execution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Package diagram for backend modules and API request lifecycle diagram.</text:span></text:p>
        </text:list-item>
        <text:list-item>
          <text:p text:style-name="P30"><text:span text:style-name="T31">Diagrams Revised:</text:span><text:span text:style-name="T32"> Prediction workflow diagram revised after aligning request payload fields with the dataset schema.</text:span></text:p>
        </text:list-item>
        <text:list-item>
          <text:p text:style-name="P33"><text:span text:style-name="T34">OO Concept Applied:</text:span><text:span text:style-name="T35"> Used dependency injection with FastAPI database sessions to keep endpoint logic clean and testable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301 FastAPI app bootstrap, TI-302 /predict endpoint creation, TI-303 /history endpoint creation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iterative development.</text:p>
            </text:list-item>
          </text:list>
        </text:list-item>
        <text:list-item>
          <text:p text:style-name="P44"><text:span text:style-name="T45">CI/CD Status:</text:span><text:span text:style-name="T46"> API boot verified locally; model loading and history write flow checked manually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8</text:span></text:p>
        </text:list-item>
        <text:list-item>
          <text:p text:style-name="P51"><text:span text:style-name="T52">Pass Rate:</text:span><text:span text:style-name="T53"> 100%</text:span></text:p>
        </text:list-item>
        <text:list-item>
          <text:p text:style-name="P54"><text:span text:style-name="T55">Key Bug Identified:</text:span><text:span text:style-name="T56"> Fixed model path resolution so the backend can load the saved ML artifact from the shared project structure.</text:span></text:p>
        </text:list-item>
      </text:list>
      <text:p text:style-name="P57">5. Goals for Next Week</text:p>
      <text:list text:style-name="LFO5" text:continue-numbering="true">
        <text:list-item>
          <text:p text:style-name="P58">Validate end-to-end request handling with realistic dashboard inputs.</text:p>
        </text:list-item>
        <text:list-item>
          <text:p text:style-name="P59">Begin frontend scaffolding with React, routing, and core pages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