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12 Jan 2026 - 18 Jan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1 of 6</text:span></text:p>
        </text:list-item>
        <text:list-item>
          <text:p text:style-name="P14"><text:span text:style-name="T15">Sprint Goal:</text:span><text:span text:style-name="T16"> Finalize project scope, sustainable farming problem statement, and initial system architecture for TerraInsights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Problem context diagram, use case diagram, and high-level activity flow for fertilizer recommendation.</text:span></text:p>
        </text:list-item>
        <text:list-item>
          <text:p text:style-name="P30"><text:span text:style-name="T31">Diagrams Revised:</text:span><text:span text:style-name="T32"> Initial draft only; no revisions yet.</text:span></text:p>
        </text:list-item>
        <text:list-item>
          <text:p text:style-name="P33"><text:span text:style-name="T34">OO Concept Applied:</text:span><text:span text:style-name="T35"> Applied modular decomposition by separating the system into ML, backend API, and frontend presentation layers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101 scope finalization, TI-102 technology stack review, TI-103 repository initialization checklist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initial prototype work tracked directly on local main.</text:p>
            </text:list-item>
          </text:list>
        </text:list-item>
        <text:list-item>
          <text:p text:style-name="P44"><text:span text:style-name="T45">CI/CD Status:</text:span><text:span text:style-name="T46"> Repository initialized; manual checklist review completed; formal CI pipeline not configured yet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0</text:span></text:p>
        </text:list-item>
        <text:list-item>
          <text:p text:style-name="P51"><text:span text:style-name="T52">Pass Rate:</text:span><text:span text:style-name="T53"> N/A%</text:span></text:p>
        </text:list-item>
        <text:list-item>
          <text:p text:style-name="P54"><text:span text:style-name="T55">Key Bug Identified:</text:span><text:span text:style-name="T56"> No code bug this week; the main issue identified was refining the problem scope to keep the project realistic for a minor project timeline.</text:span></text:p>
        </text:list-item>
      </text:list>
      <text:p text:style-name="P57">5. Goals for Next Week</text:p>
      <text:list text:style-name="LFO5" text:continue-numbering="true">
        <text:list-item>
          <text:p text:style-name="P58">Prepare detailed UML artifacts and sprint plan for six development sprints.</text:p>
        </text:list-item>
        <text:list-item>
          <text:p text:style-name="P59">Study the fertilizer dataset and map required input/output fields for the ML workflow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