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Normal" style:list-style-name="LFO1" style:family="paragraph"/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Normal" style:list-style-name="LFO2" style:family="paragraph"/>
    <style:style style:name="T2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P30" style:parent-style-name="Normal" style:list-style-name="LFO2" style:family="paragraph"/>
    <style:style style:name="T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list-style-name="LFO2" style:family="paragraph"/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Normal" style:list-style-name="LFO3" style:family="paragraph"/>
    <style:style style:name="T3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P40" style:parent-style-name="Normal" style:list-style-name="LFO3" style:family="paragraph"/>
    <style:style style:name="T4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3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" style:parent-style-name="Normal" style:list-style-name="LFO4" style:family="paragraph"/>
    <style:style style:name="T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P51" style:parent-style-name="Normal" style:list-style-name="LFO4" style:family="paragraph"/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8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9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 TerraInsights: Sustainable Fertilizer Usage Optimizer for Higher Yield</text:span></text:p>
      <text:p text:style-name="Normal"><text:span text:style-name="T5">Group ID:</text:span><text:span text:style-name="T6"> [Fill Group ID]</text:span></text:p>
      <text:p text:style-name="P7">Branch &amp; Section: CSE - [Fill Section]</text:p>
      <text:p text:style-name="Normal"><text:span text:style-name="T8">Date:</text:span><text:span text:style-name="T9"> 23 Feb 2026 - 01 Mar 2026</text:span></text:p>
      <text:p text:style-name="P10">1. Executive Summary</text:p>
      <text:list text:style-name="LFO1" text:continue-numbering="true">
        <text:list-item>
          <text:p text:style-name="P11"><text:span text:style-name="T12">Current Sprint:</text:span><text:span text:style-name="T13"> Sprint 4 of 6</text:span></text:p>
        </text:list-item>
        <text:list-item>
          <text:p text:style-name="P14"><text:span text:style-name="T15">Sprint Goal:</text:span><text:span text:style-name="T16"> Build the frontend shell with navigation, routing, and foundational pages for the user journey.</text:span></text:p>
        </text:list-item>
        <text:list-item>
          <text:p text:style-name="P17"><text:span text:style-name="T18">Status:</text:span><text:span text:style-name="T19"> On Track (Green)</text:span></text:p>
        </text:list-item>
      </text:list>
      <text:p text:style-name="P26">2. UML &amp; OOAD Progress</text:p>
      <text:list text:style-name="LFO2" text:continue-numbering="true">
        <text:list-item>
          <text:p text:style-name="P27"><text:span text:style-name="T28">Diagrams Completed this week:</text:span><text:span text:style-name="T29"> Frontend navigation flow diagram and component breakdown for page-level React modules.</text:span></text:p>
        </text:list-item>
        <text:list-item>
          <text:p text:style-name="P30"><text:span text:style-name="T31">Diagrams Revised:</text:span><text:span text:style-name="T32"> Deployment diagram refined to show the browser, FastAPI server, SQLite database, and ML artifact interaction.</text:span></text:p>
        </text:list-item>
        <text:list-item>
          <text:p text:style-name="P33"><text:span text:style-name="T34">OO Concept Applied:</text:span><text:span text:style-name="T35"> Used component composition in React to keep page modules independent while sharing the common navigation layer.</text:span></text:p>
        </text:list-item>
      </text:list>
      <text:p text:style-name="P36">3. Technical Execution (DevOps &amp; Git)</text:p>
      <text:list text:style-name="LFO3" text:continue-numbering="true">
        <text:list-item>
          <text:p text:style-name="P37"><text:span text:style-name="T38">Jira Tasks Completed:</text:span><text:span text:style-name="T39"> TI-401 Vite app setup, TI-402 router configuration, TI-403 landing/auth/profile/about screens.</text:span></text:p>
        </text:list-item>
        <text:list-item>
          <text:p text:style-name="P40"><text:span text:style-name="T41">Git Activity:</text:span></text:p>
          <text:list text:continue-numbering="true">
            <text:list-item>
              <text:p text:style-name="P42">Active Branches: main</text:p>
            </text:list-item>
            <text:list-item>
              <text:p text:style-name="P43">Merged Pull Requests: N/A - local iterative development.</text:p>
            </text:list-item>
          </text:list>
        </text:list-item>
        <text:list-item>
          <text:p text:style-name="P44"><text:span text:style-name="T45">CI/CD Status:</text:span><text:span text:style-name="T46"> Frontend compiles locally and route navigation is manually verified; automated frontend CI still pending.</text:span></text:p>
        </text:list-item>
      </text:list>
      <text:p text:style-name="P47">4. Testing Summary</text:p>
      <text:list text:style-name="LFO4" text:continue-numbering="true">
        <text:list-item>
          <text:p text:style-name="P48"><text:span text:style-name="T49">Total Unit Tests:</text:span><text:span text:style-name="T50"> 12</text:span></text:p>
        </text:list-item>
        <text:list-item>
          <text:p text:style-name="P51"><text:span text:style-name="T52">Pass Rate:</text:span><text:span text:style-name="T53"> 92%</text:span></text:p>
        </text:list-item>
        <text:list-item>
          <text:p text:style-name="P54"><text:span text:style-name="T55">Key Bug Identified:</text:span><text:span text:style-name="T56"> Resolved inconsistent localStorage-based login state handling so navigation updates correctly after authentication actions.</text:span></text:p>
        </text:list-item>
      </text:list>
      <text:p text:style-name="P57">5. Goals for Next Week</text:p>
      <text:list text:style-name="LFO5" text:continue-numbering="true">
        <text:list-item>
          <text:p text:style-name="P58">Implement the dashboard form and connect it to the backend prediction API.</text:p>
        </text:list-item>
        <text:list-item>
          <text:p text:style-name="P59">Validate form UX for domain inputs such as soil type, crop type, season, and NPK values.</text:p>
        </text:list-item>
      </text:list>
      <text:p text:style-name="P60"/>
      <text:p text:style-name="P61">Mentor Signature<text:tab/><text:tab/><text:tab/><text:tab/><text:tab/><text:tab/><text:s text:c="3"/>Project Guide Signatu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6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Amit Dangi</dc:creator>
    <meta:creation-date>2026-01-20T09:38:00Z</meta:creation-date>
    <dc:date>2026-01-20T09:45:00Z</dc:date>
    <meta:template xlink:href="Normal" xlink:type="simple"/>
    <meta:editing-cycles>2</meta:editing-cycles>
    <meta:editing-duration>PT420S</meta:editing-duration>
    <meta:document-statistic meta:page-count="1" meta:paragraph-count="2" meta:word-count="154" meta:character-count="1030" meta:row-count="7" meta:non-whitespace-character-count="878"/>
  </office:meta>
</office:document-meta>
</file>