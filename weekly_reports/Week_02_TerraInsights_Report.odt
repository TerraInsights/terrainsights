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P1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2" style:parent-style-name="Normal" style:list-style-name="LFO1" style:family="paragraph"/>
    <style:style style:name="T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P15" style:parent-style-name="Normal" style:list-style-name="LFO1" style:family="paragraph"/>
    <style:style style:name="T1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P18" style:parent-style-name="Normal" style:list-style-name="LFO1" style:family="paragraph"/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P21" style:parent-style-name="Normal" style:list-style-name="LFO1" style:family="paragraph"/>
    <style:style style:name="T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6" style:parent-style-name="Normal" style:list-style-name="LFO2" style:family="paragraph"/>
    <style:style style:name="T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P29" style:parent-style-name="Normal" style:list-style-name="LFO2" style:family="paragraph"/>
    <style:style style:name="T3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P32" style:parent-style-name="Normal" style:list-style-name="LFO2" style:family="paragraph"/>
    <style:style style:name="T3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  <style:style style:name="P35" style:parent-style-name="Normal" style:list-style-name="LFO2" style:family="paragraph"/>
    <style:style style:name="T3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P39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4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3" style:parent-style-name="Normal" style:list-style-name="LFO3" style:family="paragraph"/>
    <style:style style:name="T4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P46" style:parent-style-name="Normal" style:list-style-name="LFO3" style:family="paragraph"/>
    <style:style style:name="T4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9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50" style:parent-style-name="Normal" style:list-style-name="LFO3" style:family="paragraph"/>
    <style:style style:name="T5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" style:parent-style-name="DefaultParagraphFont" style:family="text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list-style-name="LFO4" style:family="paragraph"/>
    <style:style style:name="T5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style:font-name="Times New Roman" fo:font-size="12pt" style:font-size-asian="12pt" style:font-size-complex="12pt"/>
    </style:style>
    <style:style style:name="P60" style:parent-style-name="Normal" style:list-style-name="LFO4" style:family="paragraph"/>
    <style:style style:name="T6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4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5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<text:s/>TerraInsights: Sustainable Fertilizer Usage Optimizer for Higher Yield</text:span></text:p>
      <text:p text:style-name="Normal"><text:span text:style-name="T5">Group ID:</text:span><text:span text:style-name="T6"><text:s text:c="2"/>Group - 14 <text:s/></text:span></text:p>
      <text:p text:style-name="P7">Branch &amp; Section: B.tech CSE-DS(IBM) AI&amp;DS-IBM</text:p>
      <text:p text:style-name="Normal"><text:span text:style-name="T8">Date:</text:span><text:span text:style-name="T9"><text:s/>19 Jan 2026 - 25 Jan<text:s/></text:span><text:span text:style-name="T10">2026</text:span></text:p>
      <text:p text:style-name="P11">1. Executive Summary</text:p>
      <text:list text:style-name="LFO1" text:continue-numbering="true">
        <text:list-item>
          <text:p text:style-name="P12"><text:span text:style-name="T13">Current Sprint:</text:span><text:span text:style-name="T14"><text:s/>Sprint 1 of 6</text:span></text:p>
        </text:list-item>
        <text:list-item>
          <text:p text:style-name="P15"><text:span text:style-name="T16">Sprint Goal:</text:span><text:span text:style-name="T17"><text:s/>Complete design documentation and convert requirements into a clear implementation plan.</text:span></text:p>
        </text:list-item>
        <text:list-item>
          <text:p text:style-name="P18"><text:span text:style-name="T19">Status:</text:span><text:span text:style-name="T20"><text:s/>On Track (Green)</text:span></text:p>
        </text:list-item>
        <text:list-item>
          <text:p text:style-name="P21"><text:span text:style-name="T22">Detailed Progress:</text:span><text:span text:style-name="T23"><text:s/>This week the project concentrated on complete design documentation and convert requirements into a clear implementation plan. The team completed work around prepared a draft class diagram, a sequence diagram for the recommendation request flow, and a clearer module interaction sketch connecting ml, api, and ui responsibilities. In practical terms, the technical tasks covered TI-104 implementation plan drafting, TI-105 functional module breakdown, TI-106 data field mapping., while testing status moved to 2</text:span><text:span text:style-name="T24"><text:s/>checks with a 100% pass rate. The main observation for the week was: Resolved a requirement mismatch where the dashboard originally needed fewer inputs than the dataset columns required.</text:span></text:p>
        </text:list-item>
      </text:list>
      <text:p text:style-name="P25">2. UML &amp; OOAD Progress</text:p>
      <text:list text:style-name="LFO2" text:continue-numbering="true">
        <text:list-item>
          <text:p text:style-name="P26"><text:span text:style-name="T27">Diagrams Completed this week:</text:span><text:span text:style-name="T28"><text:s/>Prepared a draft class diagram, a sequence diagram for the recommendation request flow, and a clearer module interaction sketch connecting ML, API, and UI responsibilities.</text:span></text:p>
        </text:list-item>
        <text:list-item>
          <text:p text:style-name="P29"><text:span text:style-name="T30">Diagrams Revised:</text:span><text:span text:style-name="T31"><text:s/>Use case diagram revised after adding AgroGuide, Govt Schemes, and Store support modules.</text:span></text:p>
        </text:list-item>
        <text:list-item>
          <text:p text:style-name="P32"><text:span text:style-name="T33">Required Diagram Added:</text:span><text:span text:style-name="T34"><text:s/>Sequence Diagram - Captures the request path from Farmer input to backend prediction and recommendation response.</text:span></text:p>
        </text:list-item>
        <text:list-item>
          <text:p text:style-name="P35"><text:span text:style-name="T36">OO Concept Applied:</text:span><text:span text:style-name="T37"><text:s/>Used separation of concerns by defining independent responsibilities for the UI, API, persistence, and ML pipeline to keep the design<text:s/></text:span><text:span text:style-name="T38">maintainable.</text:span></text:p>
        </text:list-item>
      </text:list>
      <text:p text:style-name="P39"/>
      <text:p text:style-name="P40">Required Diagram Image</text:p>
      <text:soft-page-break/>
      <text:p text:style-name="P41"><draw:frame draw:style-name="a0" draw:name="Picture 1" text:anchor-type="as-char" svg:x="0in" svg:y="0in" svg:width="5.84138in" svg:height="4.23441in" style:rel-width="scale" style:rel-height="scale"><draw:image xlink:href="media/image1.png" xlink:type="simple" xlink:show="embed" xlink:actuate="onLoad"/><svg:title/><svg:desc/></draw:frame></text:p>
      <text:p text:style-name="P42">3. Technical Execution (DevOps &amp; Git)</text:p>
      <text:list text:style-name="LFO3" text:continue-numbering="true">
        <text:list-item>
          <text:p text:style-name="P43"><text:span text:style-name="T44">Jira Tasks Completed:</text:span><text:span text:style-name="T45"><text:s/>TI-104 implementation plan drafting, TI-105 functional module breakdown, TI-106 data field mapping.</text:span></text:p>
        </text:list-item>
        <text:list-item>
          <text:p text:style-name="P46"><text:span text:style-name="T47">Git Activity:</text:span></text:p>
          <text:list text:continue-numbering="true">
            <text:list-item>
              <text:p text:style-name="P48">Active Branches: main</text:p>
            </text:list-item>
            <text:list-item>
              <text:p text:style-name="P49">Merged Pull<text:s/>Requests: N/A - local prototype planning stage.</text:p>
            </text:list-item>
          </text:list>
        </text:list-item>
        <text:list-item>
          <text:p text:style-name="P50"><text:span text:style-name="T51">CI/CD Status:</text:span><text:span text:style-name="T52"><text:s/>Documentation and implementation plan reviewed manually; no automated build configured yet.</text:span></text:p>
        </text:list-item>
      </text:list>
      <text:p text:style-name="P53">4. Testing Summary</text:p>
      <text:list text:style-name="LFO4" text:continue-numbering="true">
        <text:list-item>
          <text:p text:style-name="P54"><text:span text:style-name="T55">Total Unit Tests:</text:span><text:span text:style-name="T56"><text:s/>2</text:span></text:p>
        </text:list-item>
        <text:list-item>
          <text:p text:style-name="P57"><text:span text:style-name="T58">Pass Rate:</text:span><text:span text:style-name="T59"><text:s/>100%</text:span></text:p>
        </text:list-item>
        <text:list-item>
          <text:p text:style-name="P60"><text:span text:style-name="T61">Key Bug Identified:</text:span><text:span text:style-name="T62"><text:s/>Resolved a requirement mismatch where the dashboard originally needed fewer inputs than the dataset columns required.</text:span></text:p>
        </text:list-item>
      </text:list>
      <text:p text:style-name="P63">5. Goals for Next Week</text:p>
      <text:list text:style-name="LFO5" text:continue-numbering="true">
        <text:list-item>
          <text:p text:style-name="P64">Start dataset exploration and preprocessing strategy for model training.</text:p>
        </text:list-item>
        <text:list-item>
          <text:p text:style-name="P65">Set up the ML training script and choose the initial classification model.</text:p>
        </text:list-item>
      </text:list>
      <text:p text:style-name="P66"/>
      <text:p text:style-name="Normal"><text:span text:style-name="T67">Mentor Signature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text:s text:c="3"/>Project Guide Signature</text:span><text:tab/><text:tab/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2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Hiten Hemnani</dc:creator>
    <meta:creation-date>2026-01-20T09:38:00Z</meta:creation-date>
    <dc:date>2026-04-09T16:11:00Z</dc:date>
    <meta:template xlink:href="Normal" xlink:type="simple"/>
    <meta:editing-cycles>7</meta:editing-cycles>
    <meta:editing-duration>PT780S</meta:editing-duration>
    <meta:document-statistic meta:page-count="2" meta:paragraph-count="5" meta:word-count="385" meta:character-count="2576" meta:row-count="18" meta:non-whitespace-character-count="2196"/>
  </office:meta>
</office:document-meta>
</file>